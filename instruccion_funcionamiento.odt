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/>
    <style:style style:name="P12" style:family="paragraph" style:parent-style-name="Standard" style:list-style-name="L9"/>
    <style:style style:name="P13" style:family="paragraph" style:parent-style-name="Standard" style:list-style-name="L10"/>
    <style:style style:name="P14" style:family="paragraph" style:parent-style-name="Standard" style:list-style-name="L11"/>
    <style:style style:name="P15" style:family="paragraph" style:parent-style-name="Standard" style:list-style-name="L12"/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ía de Proyecto IHKP – Explicación Completa</text:p>
      <text:p text:style-name="Standard"/>
      <text:p text:style-name="Standard"/>
      <text:p text:style-name="P2">1. Módulo inicio.py</text:p>
      <text:p text:style-name="P3">Importaciones</text:p>
      <text:p text:style-name="P3"/>
      <text:p text:style-name="Standard">import socket → Librería estándar para manejar direcciones IP locales.</text:p>
      <text:p text:style-name="Standard">import requests → Librería externa para hacer solicitudes HTTP (se usa para obtener la IP pública).</text:p>
      <text:p text:style-name="Standard">import analizador → Tu módulo propio que contiene las funciones de análisis y registro de logs.</text:p>
      <text:p text:style-name="Standard"/>
      <text:p text:style-name="P3">Funciones</text:p>
      <text:list text:style-name="L1">
        <text:list-item>
          <text:p text:style-name="P4">limpiar_consola() <text:s/></text:p>
        </text:list-item>
      </text:list>
      <text:p text:style-name="Standard"><text:tab/><text:tab/>Imprime 50 saltos de línea (\n), simulando limpiar la pantalla.</text:p>
      <text:p text:style-name="Standard"><text:tab/><text:tab/>Lógica: mejora la legibilidad en consola.</text:p>
      <text:list text:style-name="L2">
        <text:list-item>
          <text:p text:style-name="P5">obtener_ip() <text:s/></text:p>
        </text:list-item>
      </text:list>
      <text:p text:style-name="Standard"><text:tab/><text:tab/>Intenta obtener la IP pública con requests.get("https://api.ipify.org").</text:p>
      <text:p text:style-name="Standard"><text:tab/><text:tab/>Si falla, usa la IP local con socket.gethostbyname(socket.gethostname()).</text:p>
      <text:p text:style-name="Standard"><text:tab/><text:tab/>Lógica: siempre tener una IP válida para registrar eventos.</text:p>
      <text:list text:style-name="L3">
        <text:list-item>
          <text:p text:style-name="P6">menu_inicio() <text:s/></text:p>
        </text:list-item>
      </text:list>
      <text:p text:style-name="Standard"><text:tab/><text:tab/>Muestra el menú con las opciones disponibles.</text:p>
      <text:p text:style-name="Standard"><text:tab/><text:tab/>Lógica: interfaz clara para el usuario.</text:p>
      <text:list text:style-name="L4">
        <text:list-item>
          <text:p text:style-name="P7">main()</text:p>
        </text:list-item>
      </text:list>
      <text:p text:style-name="Standard"><text:tab/><text:tab/>Detecta la IP y registra "Sistema iniciado".</text:p>
      <text:p text:style-name="Standard"><text:tab/><text:tab/>Entra en un bucle while True que mantiene el menú activo.</text:p>
      <text:list text:style-name="L5">
        <text:list-item>
          <text:p text:style-name="P8">Según la opción elegida (match opcion:), ejecuta funciones de analizador y registra cada acción en logs.txt.</text:p>
        </text:list-item>
        <text:list-item>
          <text:p text:style-name="P8">Maneja errores (ValueError, KeyboardInterrupt, Exception) y también los registra.</text:p>
        </text:list-item>
      </text:list>
      <text:p text:style-name="Standard"><text:tab/><text:tab/>Lógica: es el corazón del programa, controla la interacción y asegura que todo quede <text:tab/><text:tab/>registrad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2. Módulo analizador.py</text:p>
      <text:p text:style-name="P3">Variables</text:p>
      <text:list text:style-name="L6">
        <text:list-item>
          <text:p text:style-name="P9">ARCHIVO_LOGS <text:s/></text:p>
        </text:list-item>
      </text:list>
      <text:p text:style-name="Standard"><text:tab/><text:tab/>Define la ruta del archivo logs.txt en el mismo directorio que analizador.py.</text:p>
      <text:p text:style-name="Standard"><text:tab/><text:tab/>Lógica: centralizar dónde se guardan los registros.</text:p>
      <text:p text:style-name="Standard"/>
      <text:p text:style-name="P3">Funciones</text:p>
      <text:list text:style-name="L7">
        <text:list-item>
          <text:p text:style-name="P10">registrar_log(tipo, ip, descripcion) <text:s/></text:p>
        </text:list-item>
      </text:list>
      <text:p text:style-name="Standard"><text:tab/><text:tab/>Escribe una línea en logs.txt con fecha, hora, tipo, IP y descripción.</text:p>
      <text:p text:style-name="Standard"><text:tab/><text:tab/>Lógica: persistencia de eventos.</text:p>
      <text:list text:style-name="L8">
        <text:list-item>
          <text:p text:style-name="P11">leer_logs() <text:s/></text:p>
        </text:list-item>
      </text:list>
      <text:p text:style-name="Standard"><text:tab/><text:tab/>Abre logs.txt y devuelve todas las líneas como lista.</text:p>
      <text:p text:style-name="Standard"><text:tab/><text:tab/>Lógica: base para cualquier análisis.</text:p>
      <text:list text:style-name="L9">
        <text:list-item>
          <text:p text:style-name="P12">mostrar_logs(logs) <text:s/></text:p>
        </text:list-item>
      </text:list>
      <text:p text:style-name="Standard"><text:tab/><text:tab/>Imprime los logs en formato tabular.</text:p>
      <text:p text:style-name="Standard"><text:tab/><text:tab/>Lógica: presentación clara de la información.</text:p>
      <text:list text:style-name="L10">
        <text:list-item>
          <text:p text:style-name="P13">buscar_por_tipo(logs, tipo) <text:s/></text:p>
        </text:list-item>
      </text:list>
      <text:p text:style-name="Standard"><text:tab/><text:tab/>Filtra los logs por tipo (INFO, WARNING, ERROR).</text:p>
      <text:p text:style-name="Standard"><text:tab/><text:tab/>Lógica: permite auditar eventos específicos.</text:p>
      <text:list text:style-name="L11">
        <text:list-item>
          <text:p text:style-name="P14">buscar_por_ip(logs, ip) <text:s/></text:p>
        </text:list-item>
      </text:list>
      <text:p text:style-name="Standard"><text:tab/><text:tab/>Filtra los logs por dirección IP.</text:p>
      <text:p text:style-name="Standard"><text:tab/><text:tab/>Lógica: detectar actividad asociada a una IP concreta.</text:p>
      <text:list text:style-name="L12">
        <text:list-item>
          <text:p text:style-name="P15">detectar_ips_sospechosas(logs) <text:s/></text:p>
        </text:list-item>
      </text:list>
      <text:p text:style-name="Standard"><text:tab/><text:tab/>Cuenta cuántos eventos sospechosos tiene cada IP y devuelve un diccionario con las <text:tab/><text:tab/>que superan cierto umbral.</text:p>
      <text:p text:style-name="Standard"><text:tab/><text:tab/>Lógica: identificar patrones de ataque o comportamiento anómal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3. Archivo logs.txt</text:p>
      <text:p text:style-name="Standard">Cada línea tiene el formato:</text:p>
      <text:p text:style-name="Standard"/>
      <text:p text:style-name="Standard">Código</text:p>
      <text:p text:style-name="Standard">YYYY-MM-DD,HH:MM:SS,TIPO,IP,DESCRIPCIÓN</text:p>
      <text:p text:style-name="Standard">Ejemplo:</text:p>
      <text:p text:style-name="Standard"/>
      <text:p text:style-name="Standard">Código</text:p>
      <text:p text:style-name="Standard">2026-06-21,01:25:01,INFO,127.0.0.1,Sistema iniciado</text:p>
      <text:p text:style-name="Standard">2026-06-21,01:25:10,INFO,127.0.0.1,Opción 1 - Mostrar todos los logs</text:p>
      <text:p text:style-name="Standard">2026-06-21,01:25:20,INFO,127.0.0.1,Sistema cerrado</text:p>
      <text:p text:style-name="Standard">Lógica: es la bitácora del sistema, permite auditar lo ocurrido incluso después de cerrar el program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4. Lógica General del Sistema</text:p>
      <text:p text:style-name="Standard">Inicio → Detecta IP y registra “Sistema iniciado”.</text:p>
      <text:p text:style-name="Standard"/>
      <text:p text:style-name="Standard">Menú interactivo → El usuario elige una opción.</text:p>
      <text:p text:style-name="Standard"/>
      <text:p text:style-name="Standard">Acción → Se ejecuta la función correspondiente en analizador.py.</text:p>
      <text:p text:style-name="Standard"/>
      <text:p text:style-name="Standard">Registro → Se guarda el evento en logs.txt.</text:p>
      <text:p text:style-name="Standard"/>
      <text:p text:style-name="Standard">Persistencia → Al cerrar, queda todo guardado para futuras auditorías.</text:p>
      <text:p text:style-name="Standard"/>
      <text:p text:style-name="Standard">5. Cómo defenderlo oralmente</text:p>
      <text:p text:style-name="Standard">“El programa está dividido en dos módulos: inicio.py maneja la interacción con el usuario y analizador.py procesa los logs.”</text:p>
      <text:p text:style-name="Standard"/>
      <text:p text:style-name="Standard">“Cada acción se registra automáticamente en logs.txt con fecha, hora, tipo, IP y descripción.”</text:p>
      <text:p text:style-name="Standard"/>
      <text:p text:style-name="Standard">“Esto asegura trazabilidad y permite detectar comportamientos sospechosos en las IPs.”</text:p>
      <text:p text:style-name="Standard"/>
      <text:p text:style-name="Standard">“La lógica es imperativa: uso variables, asignaciones, bucles while y for, condicionales if, funciones y módulos separados.”</text:p>
      <text:p text:style-name="Standard"/>
      <text:p text:style-name="Standard">👉 Con este contenido ya tenés tu guía com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UY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1T02:05:40.071079372</meta:creation-date>
    <dc:date>2026-06-21T02:19:31.400170227</dc:date>
    <meta:editing-duration>PT13M51S</meta:editing-duration>
    <meta:editing-cycles>1</meta:editing-cycles>
    <meta:document-statistic meta:table-count="0" meta:image-count="0" meta:object-count="0" meta:page-count="4" meta:paragraph-count="69" meta:word-count="471" meta:character-count="3389" meta:non-whitespace-character-count="2927"/>
    <meta:generator>LibreOffice/7.4.7.2$Linux_X86_64 LibreOffice_project/40$Build-2</meta:generator>
  </office:meta>
</office:document-meta>
</file>