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09252382CA04CB023A6.png" manifest:media-type="image/png"/>
  <manifest:file-entry manifest:full-path="Pictures/100000010000011D0000011B05AE977EBEE05563.png" manifest:media-type="image/png"/>
  <manifest:file-entry manifest:full-path="Pictures/100000010000058000000300F7DA373F6656559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039cm" fo:margin-left="-0.025cm" table:align="left"/>
    </style:style>
    <style:style style:name="Tabla1.A" style:family="table-column">
      <style:table-column-properties style:column-width="5.715cm"/>
    </style:style>
    <style:style style:name="Tabla1.B" style:family="table-column">
      <style:table-column-properties style:column-width="5.644cm"/>
    </style:style>
    <style:style style:name="Tabla1.C" style:family="table-column">
      <style:table-column-properties style:column-width="5.68cm"/>
    </style:style>
    <style:style style:name="Tabla1.1" style:family="table-row">
      <style:table-row-properties style:min-row-height="1.693cm"/>
    </style:style>
    <style:style style:name="Tabla1.A1" style:family="table-cell">
      <style:table-cell-properties fo:padding="0.097cm" fo:border="none" style:writing-mode="page"/>
    </style:style>
    <style:style style:name="P1" style:family="paragraph" style:parent-style-name="Footer">
      <style:text-properties officeooo:rsid="0022d860" officeooo:paragraph-rsid="0022d860"/>
    </style:style>
    <style:style style:name="P2" style:family="paragraph" style:parent-style-name="Standard">
      <style:paragraph-properties fo:margin-left="5.366cm" fo:margin-right="1.549cm" fo:line-height="150%" fo:text-indent="0cm" style:auto-text-indent="false"/>
      <style:text-properties style:font-name="Liberation Serif" fo:font-size="14pt" officeooo:rsid="001b9dbd" officeooo:paragraph-rsid="0022d860" style:font-size-asian="14pt" style:font-size-complex="14pt"/>
    </style:style>
    <style:style style:name="P3" style:family="paragraph" style:parent-style-name="Standard">
      <style:paragraph-properties fo:margin-left="5.366cm" fo:margin-right="1.549cm" fo:line-height="150%" fo:text-indent="0cm" style:auto-text-indent="false"/>
      <style:text-properties style:font-name="Liberation Serif" fo:font-size="14pt" officeooo:paragraph-rsid="0022d860" style:font-size-asian="14pt" style:font-size-complex="14pt"/>
    </style:style>
    <style:style style:name="P4" style:family="paragraph" style:parent-style-name="Standard">
      <style:paragraph-properties fo:margin-left="5.366cm" fo:margin-right="0cm" fo:margin-top="0.002cm" fo:margin-bottom="0.282cm" style:contextual-spacing="false" fo:line-height="150%" fo:text-indent="0cm" style:auto-text-indent="false"/>
      <style:text-properties style:font-name="Liberation Serif" fo:font-size="14pt" officeooo:paragraph-rsid="0022d860" style:font-size-asian="14pt" style:font-size-complex="14pt"/>
    </style:style>
    <style:style style:name="P5" style:family="paragraph" style:parent-style-name="Standard">
      <style:text-properties style:font-name="Liberation Serif" fo:font-size="14pt" officeooo:paragraph-rsid="001f4224" style:font-size-asian="14pt" style:font-size-complex="14pt"/>
    </style:style>
    <style:style style:name="P6" style:family="paragraph" style:parent-style-name="Standard">
      <style:paragraph-properties fo:margin-left="5.366cm" fo:margin-right="1.549cm" fo:line-height="150%" fo:text-indent="0cm" style:auto-text-indent="false"/>
      <style:text-properties style:font-name="Liberation Serif" fo:font-size="14pt" fo:language="es" fo:country="none" fo:font-weight="bold" officeooo:rsid="0022d860" officeooo:paragraph-rsid="0022d860" style:font-name-asian="Arial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left="5.366cm" fo:margin-right="1.549cm" fo:line-height="150%" fo:text-indent="0cm" style:auto-text-indent="false"/>
      <style:text-properties style:font-name="Liberation Serif" fo:font-size="14pt" fo:language="es" fo:country="none" officeooo:rsid="0022d860" officeooo:paragraph-rsid="0022d860" style:font-size-asian="14pt" style:font-name-complex="Times New Roman" style:font-size-complex="14pt"/>
    </style:style>
    <style:style style:name="P8" style:family="paragraph" style:parent-style-name="Standard">
      <style:paragraph-properties fo:margin-left="5.366cm" fo:margin-right="1.549cm" fo:line-height="150%" fo:text-indent="0cm" style:auto-text-indent="false"/>
      <style:text-properties style:font-name="Liberation Serif" fo:font-size="14pt" fo:language="es" fo:country="none" officeooo:paragraph-rsid="0022d860" style:font-size-asian="14pt" style:font-name-complex="Times New Roman" style:font-size-complex="14pt"/>
    </style:style>
    <style:style style:name="P9" style:family="paragraph" style:parent-style-name="Standard">
      <style:paragraph-properties fo:margin-left="5.366cm" fo:margin-right="1.549cm" fo:line-height="150%" fo:text-indent="0cm" style:auto-text-indent="false"/>
      <style:text-properties style:font-name="Liberation Serif" fo:font-size="14pt" fo:language="es" fo:country="none" officeooo:rsid="002b72f4" officeooo:paragraph-rsid="002b72f4" style:font-size-asian="14pt" style:font-name-complex="Times New Roman" style:font-size-complex="14pt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text-properties style:font-name="Liberation Serif" officeooo:paragraph-rsid="0022d860"/>
    </style:style>
    <style:style style:name="P12" style:family="paragraph" style:parent-style-name="Standard">
      <style:paragraph-properties fo:margin-left="5.048cm" fo:margin-right="0cm" fo:line-height="150%" fo:text-indent="0cm" style:auto-text-indent="false"/>
      <style:text-properties style:font-name="Liberation Serif" officeooo:paragraph-rsid="0022d860"/>
    </style:style>
    <style:style style:name="P13" style:family="paragraph" style:parent-style-name="Standard">
      <style:text-properties style:font-name="Liberation Serif" officeooo:rsid="0022d860"/>
    </style:style>
    <style:style style:name="P14" style:family="paragraph" style:parent-style-name="Standard">
      <style:text-properties style:font-name="Liberation Serif" fo:font-size="12pt" officeooo:rsid="0022d860" officeooo:paragraph-rsid="0022d860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2d860" officeooo:paragraph-rsid="002605f8" style:font-size-asian="12pt" style:font-size-complex="12pt"/>
    </style:style>
    <style:style style:name="P16" style:family="paragraph" style:parent-style-name="Standard">
      <style:text-properties style:font-name="Liberation Serif" fo:font-size="12pt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f4224" officeooo:paragraph-rsid="001f4224" style:font-size-asian="12pt" style:font-size-complex="12pt"/>
    </style:style>
    <style:style style:name="P18" style:family="paragraph" style:parent-style-name="Standard">
      <style:paragraph-properties fo:margin-left="11.43cm" fo:margin-right="0cm" fo:line-height="150%" fo:text-indent="1.27cm" style:auto-text-indent="false"/>
      <style:text-properties style:font-name="Liberation Serif" fo:font-size="12pt" fo:language="es" fo:country="none" officeooo:rsid="001b9dbd" officeooo:paragraph-rsid="0022d860" style:font-size-asian="12pt" style:font-name-complex="Times New Roman" style:font-size-complex="12pt"/>
    </style:style>
    <style:style style:name="P19" style:family="paragraph" style:parent-style-name="Table_20_Contents">
      <style:text-properties style:font-name="Liberation Serif"/>
    </style:style>
    <style:style style:name="P20" style:family="paragraph" style:parent-style-name="Text_20_body">
      <style:text-properties style:font-name="Liberation Serif"/>
    </style:style>
    <style:style style:name="P21" style:family="paragraph" style:parent-style-name="Standard">
      <style:paragraph-properties fo:margin-left="5.366cm" fo:margin-right="1.549cm" fo:line-height="150%" fo:text-indent="0cm" style:auto-text-indent="false"/>
      <style:text-properties style:font-name="Liberation Serif" fo:font-size="18pt" fo:language="es" fo:country="none" fo:font-weight="bold" officeooo:rsid="0022d860" officeooo:paragraph-rsid="0022d860" style:font-name-asian="Arial" style:font-size-asian="18pt" style:font-weight-asian="bold" style:font-name-complex="Times New Roman" style:font-size-complex="18pt"/>
    </style:style>
    <style:style style:name="P22" style:family="paragraph" style:parent-style-name="Standard">
      <style:paragraph-properties fo:margin-left="5.048cm" fo:margin-right="0cm" fo:line-height="150%" fo:text-indent="0cm" style:auto-text-indent="false"/>
      <style:text-properties fo:color="#000000" loext:opacity="100%" style:font-name="Liberation Serif" fo:font-size="6.5pt" officeooo:paragraph-rsid="0022d860" style:font-name-asian="Times New Roman" style:font-size-asian="6.5pt" style:font-name-complex="Arial" style:font-size-complex="6.5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style:font-name="Liberation Serif" fo:font-size="18pt" style:font-size-asian="18pt" style:font-size-complex="18pt"/>
    </style:style>
    <style:style style:name="P26" style:family="paragraph" style:parent-style-name="Heading_20_1">
      <style:text-properties style:font-name="Liberation Serif" fo:font-size="18pt" officeooo:paragraph-rsid="002dc790" style:font-size-asian="18pt" style:font-size-complex="18pt"/>
    </style:style>
    <style:style style:name="P27" style:family="paragraph" style:parent-style-name="Heading_20_1">
      <style:text-properties style:font-name="Liberation Serif" officeooo:rsid="00292ba0" officeooo:paragraph-rsid="00292ba0"/>
    </style:style>
    <style:style style:name="P28" style:family="paragraph" style:parent-style-name="Heading_20_1">
      <style:text-properties style:font-name="Liberation Serif"/>
    </style:style>
    <style:style style:name="P29" style:family="paragraph" style:parent-style-name="Heading_20_1">
      <style:text-properties officeooo:paragraph-rsid="002ed3ef"/>
    </style:style>
    <style:style style:name="P30" style:family="paragraph" style:parent-style-name="Standard">
      <style:text-properties style:font-name="Liberation Serif" fo:font-size="12pt" style:font-size-asian="12pt" style:font-size-complex="12pt"/>
    </style:style>
    <style:style style:name="P31" style:family="paragraph" style:parent-style-name="Standard">
      <style:text-properties style:font-name="Liberation Serif" fo:font-size="12pt" officeooo:paragraph-rsid="002dc790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f4224" officeooo:paragraph-rsid="001f4224" style:font-size-asian="12pt" style:font-size-complex="12pt"/>
    </style:style>
    <style:style style:name="P33" style:family="paragraph" style:parent-style-name="Text_20_body">
      <style:text-properties fo:font-size="12pt" officeooo:paragraph-rsid="002dc790" style:font-size-asian="10.5pt" style:font-size-complex="12p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solid" draw:fill-color="#292929"/>
      <style:paragraph-properties fo:text-align="start"/>
    </style:style>
    <style:style style:name="T1" style:family="text">
      <style:text-properties officeooo:rsid="00329dd4"/>
    </style:style>
    <style:style style:name="T2" style:family="text">
      <style:text-properties fo:language="es" fo:country="none" style:font-name-complex="Times New Roman"/>
    </style:style>
    <style:style style:name="T3" style:family="text">
      <style:text-properties fo:language="es" fo:country="none" officeooo:rsid="00217fa9" style:font-name-complex="Times New Roman"/>
    </style:style>
    <style:style style:name="T4" style:family="text">
      <style:text-properties fo:language="es" fo:country="none" officeooo:rsid="001b9dbd" style:font-name-complex="Times New Roman"/>
    </style:style>
    <style:style style:name="T5" style:family="text">
      <style:text-properties officeooo:rsid="0023db1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277993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8pt" officeooo:rsid="002ed3ef" style:font-size-asian="18pt" style:font-size-complex="18pt"/>
    </style:style>
    <style:style style:name="T11" style:family="text">
      <style:text-properties officeooo:rsid="00300929"/>
    </style:style>
    <style:style style:name="T12" style:family="text">
      <style:text-properties officeooo:rsid="00341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642cm, 2.01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 style:parent-style-name="Frame">
      <style:graphic-properties draw:stroke="none" svg:stroke-width="0cm" draw:fill="none" loext:fill-use-slide-background="false" draw:textarea-vertical-align="middle" draw:auto-grow-height="false" fo:min-height="0cm" fo:min-width="10.303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none" svg:stroke-width="0cm" draw:fill="solid" draw:fill-color="#292929" draw:textarea-vertical-align="middle" draw:auto-grow-height="false" fo:min-height="0cm" fo:min-width="10.303cm" fo:padding-top="0.254cm" fo:padding-bottom="0.254cm" fo:padding-left="0.254cm" fo:padding-right="0.254cm" fo:wrap-option="wrap" style:run-through="foreground"/>
    </style:style>
    <style:style style:name="gr5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><draw:frame draw:style-name="fr3" draw:name="Imagen3" text:anchor-type="char" svg:x="0.492cm" svg:y="0.43cm" svg:width="16.251cm" svg:height="8.354cm" draw:z-index="0"><draw:image xlink:href="Pictures/100000010000058000000300F7DA373F6656559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/>
      <text:p text:style-name="P12"><draw:g text:anchor-type="as-char" draw:z-index="1" draw:name="Forma1" draw:style-name="gr5"><draw:g draw:style-name="gr2"><draw:custom-shape draw:name="Rectangle 4" draw:style-name="gr3" draw:text-style-name="P34" svg:width="10.81cm" svg:height="0.018cm" svg:x="0cm" svg:y="0cm"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Rectangle 5" draw:style-name="gr3" draw:text-style-name="P34" svg:width="10.81cm" svg:height="0.018cm" svg:x="0cm" svg:y="0cm"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Rectangle 6" draw:style-name="gr3" draw:text-style-name="P34" svg:width="10.81cm" svg:height="0.018cm" svg:x="0cm" svg:y="0cm"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Freeform: Shape 2" draw:style-name="gr4" draw:text-style-name="P35" svg:width="10.81cm" svg:height="0.018cm" svg:x="0cm" svg:y="0cm"><text:p/><draw:enhanced-geometry draw:mirror-horizontal="false" draw:mirror-vertical="false" svg:viewBox="0 0 0 0" drawooo:sub-view-size="3891280 6350" draw:text-areas="0 0 ?f0 ?f1" draw:type="ooxml-non-primitive" draw:enhanced-path="M 1937385 0 L 1931035 0 1397635 0 1391920 0 0 0 0 6350 1391920 6350 1397635 6350 1931035 6350 1937385 6350 1937385 0 Z M 3891280 0 L 1937385 0 1937385 6350 3891280 6350 3891280 0 Z N"><draw:equation draw:name="f0" draw:formula="logwidth"/><draw:equation draw:name="f1" draw:formula="logheight"/></draw:enhanced-geometry></draw:custom-shape></draw:g></draw:g></draw:g></draw:g></text:p>
      <text:p text:style-name="P22"/>
      <text:p text:style-name="P21">Manual <text:span text:style-name="T11">del </text:span>Sistema de Instrucciones de Herramientas KP (SIHKP)</text:p>
      <text:p text:style-name="P6"/>
      <text:p text:style-name="P2"><text:span text:style-name="T3">I</text:span><text:span text:style-name="T2">nstituto Tecnológico de Informática</text:span></text:p>
      <text:p text:style-name="P8">Autor: Santiago Dellapiazza</text:p>
      <text:p text:style-name="P9">Asignatura: Introducción a la Programación</text:p>
      <text:p text:style-name="P7">Docente: Andrés Álvarez</text:p>
      <text:p text:style-name="P3"><text:span text:style-name="T2">Año: 202</text:span><text:span text:style-name="T4">6</text:span></text:p>
      <text:p text:style-name="P4"><text:span text:style-name="T2">Grupo: </text:span><text:span text:style-name="T4">TC1</text:span></text:p>
      <text:p text:style-name="P12"><draw:g text:anchor-type="as-char" svg:y="-0.002cm" draw:z-index="2" draw:name="Forma2" draw:style-name="gr1"><draw:g draw:style-name="gr2"><draw:custom-shape draw:name="Rectangle 1" draw:style-name="gr3" draw:text-style-name="P34" svg:width="10.81cm" svg:height="0.018cm" svg:x="0cm" svg:y="0cm"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Rectangle 2" draw:style-name="gr3" draw:text-style-name="P34" svg:width="10.81cm" svg:height="0.018cm" svg:x="0cm" svg:y="0cm"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Rectangle 3" draw:style-name="gr3" draw:text-style-name="P34" svg:width="10.81cm" svg:height="0.018cm" svg:x="0cm" svg:y="0cm"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Freeform: Shape 1" draw:style-name="gr4" draw:text-style-name="P35" svg:width="10.81cm" svg:height="0.018cm" svg:x="0cm" svg:y="0cm"><text:p/><draw:enhanced-geometry draw:mirror-horizontal="false" draw:mirror-vertical="false" svg:viewBox="0 0 0 0" drawooo:sub-view-size="3891280 6350" draw:text-areas="0 0 ?f0 ?f1" draw:type="ooxml-non-primitive" draw:enhanced-path="M 1937385 0 L 1931035 0 1397635 0 1391920 0 0 0 0 6350 1391920 6350 1397635 6350 1931035 6350 1937385 6350 1937385 0 Z M 3891280 0 L 1937385 0 1937385 6350 3891280 6350 3891280 0 Z N"><draw:equation draw:name="f0" draw:formula="logwidth"/><draw:equation draw:name="f1" draw:formula="logheight"/></draw:enhanced-geometry></draw:custom-shape></draw:g></draw:g></draw:g></draw:g></text:p>
      <text:p text:style-name="P18">Junio 2026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a1.1">
          <table:table-cell table:style-name="Tabla1.A1" office:value-type="string">
            <text:p text:style-name="P19"><draw:frame draw:style-name="fr2" draw:name="Imagen1" text:anchor-type="char" svg:width="2.845cm" svg:height="2.824cm" draw:z-index="9"><draw:image xlink:href="Pictures/100000010000011D0000011B05AE977EBEE05563.png" xlink:type="simple" xlink:show="embed" xlink:actuate="onLoad" draw:mime-type="image/png"/></draw:frame></text:p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><draw:frame draw:style-name="fr1" draw:name="Imagen2" text:anchor-type="char" svg:x="0cm" svg:y="0.776cm" svg:width="5.667cm" svg:height="1.655cm" draw:z-index="10"><draw:image xlink:href="Pictures/10000000000001F40000009252382CA04CB023A6.png" xlink:type="simple" xlink:show="embed" xlink:actuate="onLoad" draw:mime-type="image/png"/></draw:frame></text:p>
          </table:table-cell>
        </table:table-row>
      </table:table>
      <text:p text:style-name="P10"/>
      <text:h text:style-name="P25" text:outline-level="1"><text:bookmark-start text:name="__RefHeading___Toc35040_3656226483"/>Índi<text:span text:style-name="T5">ce</text:span><text:bookmark-end text:name="__RefHeading___Toc35040_3656226483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3"><text:a xlink:type="simple" xlink:href="#__RefHeading___Toc35040_3656226483" text:style-name="Index_20_Link" text:visited-style-name="Index_20_Link">Índice<text:tab/>2</text:a></text:p>
          <text:p text:style-name="P23"><text:a xlink:type="simple" xlink:href="#__RefHeading___Toc35795_3656226483" text:style-name="Index_20_Link" text:visited-style-name="Index_20_Link">Hoja testigo<text:tab/>3</text:a></text:p>
          <text:p text:style-name="P23"><text:a xlink:type="simple" xlink:href="#__RefHeading___Toc35146_3656226483" text:style-name="Index_20_Link" text:visited-style-name="Index_20_Link">Letra del proyecto final - Introducción a la programación<text:tab/>4</text:a></text:p>
          <text:p text:style-name="P23"><text:a xlink:type="simple" xlink:href="#__RefHeading___Toc35773_3656226483" text:style-name="Index_20_Link" text:visited-style-name="Index_20_Link">Anexo<text:tab/>5</text:a></text:p>
          <text:p text:style-name="P23"><text:a xlink:type="simple" xlink:href="#__RefHeading___Toc35780_3656226483" text:style-name="Index_20_Link" text:visited-style-name="Index_20_Link">inicio.py<text:tab/>6</text:a></text:p>
          <text:p text:style-name="P23"><text:a xlink:type="simple" xlink:href="#__RefHeading___Toc35782_3656226483" text:style-name="Index_20_Link" text:visited-style-name="Index_20_Link">analizador.py<text:tab/>9</text:a></text:p>
          <text:p text:style-name="P23"><text:a xlink:type="simple" xlink:href="#__RefHeading___Toc35784_3656226483" text:style-name="Index_20_Link" text:visited-style-name="Index_20_Link">logs.txt<text:tab/>11</text:a></text:p>
          <text:p text:style-name="P23"><text:a xlink:type="simple" xlink:href="#__RefHeading___Toc35791_3656226483" text:style-name="Index_20_Link" text:visited-style-name="Index_20_Link">Hoja testigo<text:tab/>15</text:a></text:p>
        </text:index-body>
      </text:table-of-content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7" text:outline-level="1" text:is-list-header="true"><text:bookmark-start text:name="__RefHeading___Toc35795_3656226483"/><text:soft-page-break/><text:span text:style-name="T6">Hoja testigo</text:span><text:bookmark-end text:name="__RefHeading___Toc35795_3656226483"/></text:h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5" text:outline-level="1" text:is-list-header="true"><text:bookmark-start text:name="__RefHeading___Toc35146_3656226483"/><text:soft-page-break/>Letra del proyecto final - Introducción a la programación<text:bookmark-end text:name="__RefHeading___Toc35146_3656226483"/></text:h>
      <text:p text:style-name="P14"/>
      <text:p text:style-name="P14">Consigna de la tarea</text:p>
      <text:p text:style-name="P14"><text:tab/>● Se solicita desarrollar un programa que ofrezca soluciones en el terreno de la <text:tab/>ciberseguridad.</text:p>
      <text:p text:style-name="P14"/>
      <text:p text:style-name="P14">Particularidades de la tarea</text:p>
      <text:p text:style-name="P14"><text:tab/>● La tarea se puede realizar en grupos de hasta 3 integrantes.</text:p>
      <text:p text:style-name="P14"><text:tab/>● Se debe entregar un programa y un documento al correo andresalvarez116@gmail.com</text:p>
      <text:p text:style-name="P14"><text:tab/>● La fecha límite de entrega presencial es el martes 23/6/2026 (se recomienda entregarlo <text:tab/>antes).</text:p>
      <text:p text:style-name="P14"><text:tab/>● La entrega incorporará 3 consultas orales para medir el conocimiento sobre lo entregado.</text:p>
      <text:p text:style-name="P14"><text:tab/>Si la entrega es de 9, cada respuesta vale 3 puntos. Si es de 12, cada respuesta vale 4 puntos.</text:p>
      <text:p text:style-name="P14"><text:tab/>Este cálculo generará tu evaluación del 2° parcial. Pesa un 50% de la nota final de la <text:tab/>asignatura.</text:p>
      <text:p text:style-name="P14"/>
      <text:p text:style-name="P14">Particularidades del programa a entregar</text:p>
      <text:p text:style-name="P14"><text:tab/>● Se debe entregar un archivo ejecutable del programa, realizado en algún lenguaje <text:tab/>imperativo, como C.</text:p>
      <text:p text:style-name="P14"><text:tab/>● El programa debe incorporar al menos el 50% de los conceptos propuestos en los temas <text:tab/>del curso.</text:p>
      <text:p text:style-name="P14"><text:tab/>● Se debe utilizar estructuras de datos de tipo secuencia, colección o archivo para gestionar <text:tab/>los datos.</text:p>
      <text:p text:style-name="P14"/>
      <text:p text:style-name="P14">Particularidades del documento a entregar</text:p>
      <text:p text:style-name="P14"><text:tab/>● Texto en times new roman. Texto normal en tamaño 12, subtítulos en 14 y títulos en 18.</text:p>
      <text:p text:style-name="P14"><text:tab/>● Un solo documento con carátula con datos de integrantes, del proyecto, de la asignatura y <text:tab/>del instituto.</text:p>
      <text:p text:style-name="P15"><text:tab/>Incorpora: <text:s text:c="5"/></text:p>
      <text:p text:style-name="P15"><text:tab/><text:tab/>– Índice y páginas numeradas. Estructura e Índice automático</text:p>
      <text:p text:style-name="P14"><text:tab/><text:tab/>– Código fuente del programa.</text:p>
      <text:p text:style-name="P14"><text:tab/><text:tab/>– Argumentos que fundamenten:</text:p>
      <text:p text:style-name="P14"><text:tab/><text:tab/><text:tab/>➢ Qué soluciones ofrece el programa en el terreno de la ciberseguridad</text:p>
      <text:p text:style-name="P14"><text:tab/><text:tab/><text:tab/>➢ El programa incorpora al menos el 50% de los conceptos propuestos en los <text:tab/><text:tab/><text:tab/>temas del curso.</text:p>
      <text:p text:style-name="P14"/>
      <text:p text:style-name="P14">Evaluación</text:p>
      <text:p text:style-name="P14"><text:tab/>● Se evaluará el nivel de satisfacción que entregan tu programa y documento.</text:p>
      <text:p text:style-name="P14"/>
      <text:p text:style-name="P14">El rango de calificación_proyecto es del 1 al 12.</text:p>
      <text:p text:style-name="P14"><text:tab/>● Se realizarán 3 preguntas orales al estudiante. Cada una vale 1⁄3 de calificación_proyecto.</text:p>
      <text:p text:style-name="P14"/>
      <text:p text:style-name="P14"/>
      <text:p text:style-name="P14">Enlaces web a información sobre la unidad curricular</text:p>
      <text:p text:style-name="P14"><text:tab/>● Programa de la unidad curricular</text:p>
      <text:p text:style-name="P14"><text:tab/>● Evaluación en nivel terciario de la DGETP</text:p>
      <text:p text:style-name="P14"/>
      <text:h text:style-name="P25" text:outline-level="1"><text:bookmark-start text:name="__RefHeading___Toc35773_3656226483"/><text:soft-page-break/>Anexo<text:bookmark-end text:name="__RefHeading___Toc35773_3656226483"/></text:h>
      <text:p text:style-name="P14">Temas del curso de la unidad curricular “Introducción a la programación”</text:p>
      <text:p text:style-name="P14"/>
      <text:p text:style-name="P14">1. Introducción a la computación</text:p>
      <text:p text:style-name="P14"><text:tab/>a) Noción de algoritmo</text:p>
      <text:p text:style-name="P14"><text:tab/>b) Lenguaje de programación: sintaxis y semántica</text:p>
      <text:p text:style-name="P14"><text:tab/>c) Compilación y ejecución de programas.</text:p>
      <text:p text:style-name="P14">2. Introducción a la programación imperativa</text:p>
      <text:p text:style-name="P14"><text:tab/>a) Estructura de un programa</text:p>
      <text:p text:style-name="P14"><text:tab/>b) Identificadores, constantes y variables</text:p>
      <text:p text:style-name="P14"><text:tab/>c) Tipos de datos básicos</text:p>
      <text:p text:style-name="P14"><text:tab/>d) Asignación y expresiones</text:p>
      <text:p text:style-name="P14"><text:tab/>e) Entrada y salida</text:p>
      <text:p text:style-name="P14">3. Algoritmo y estructuras de control</text:p>
      <text:p text:style-name="P14"><text:tab/>a) Secuencia, selección e iteración</text:p>
      <text:p text:style-name="P14"><text:tab/>b) Introducción a la recursión</text:p>
      <text:p text:style-name="P14">4. Estructuras de datos</text:p>
      <text:p text:style-name="P14"><text:tab/>a) Tipos primitivos</text:p>
      <text:p text:style-name="P14"><text:tab/>b) Tipos estructurados</text:p>
      <text:p text:style-name="P14">5. Descomposición y modularización</text:p>
      <text:p text:style-name="P14"><text:tab/>a) Subprogramas (funciones y procedimientos)</text:p>
      <text:p text:style-name="P14"><text:tab/>b)Especificación de operaciones mediante pre y post condiciones</text:p>
      <text:p text:style-name="P14"><text:tab/>c) Pasajes de parámetro</text:p>
      <text:p text:style-name="P14">6. Algoritmos de búsqueda y ordenación</text:p>
      <text:p text:style-name="P14"><text:tab/>a) Búsquedas lineal y binaria</text:p>
      <text:p text:style-name="P14"><text:tab/>b) Algoritmos de ordenación</text:p>
      <text:p text:style-name="P14"><text:tab/>c) Análisis de estos algoritmos</text:p>
      <text:p text:style-name="P14">7. Calidad y corrección</text:p>
      <text:p text:style-name="P14"><text:tab/>a) Errores. Tipos de errores</text:p>
      <text:p text:style-name="P14"><text:tab/>b) Buenas prácticas de diseño e implementación</text:p>
      <text:p text:style-name="P14"><text:tab/>c) Nociones básicas de corrección de programas</text:p>
      <text:p text:style-name="P14"/>
      <text:p text:style-name="P14">Tecnólogo en ciberseguridad - Terciario - UTU ITI - DGETP - Profesor Andrés Álvarez</text:p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5" text:outline-level="1" text:is-list-header="true"><text:bookmark-start text:name="__RefHeading___Toc35780_3656226483"/><text:soft-page-break/>inicio.py<text:bookmark-end text:name="__RefHeading___Toc35780_3656226483"/></text:h>
      <text:p text:style-name="P16"/>
      <text:p text:style-name="P16"># PROGRAMA IHKP HECHO POR SANTIAGO DELLAPIAZZA. JUNIO 2026 - INSTITUTO TECNOLÓGICO DE INFORMÁTICA (I.T.I.)</text:p>
      <text:p text:style-name="P16">import socket</text:p>
      <text:p text:style-name="P16">import analizador</text:p>
      <text:p text:style-name="P16">import requests</text:p>
      <text:p text:style-name="P16"/>
      <text:p text:style-name="P16">def limpiar_consola():</text:p>
      <text:p text:style-name="P16"><text:s text:c="4"/>print("\n" * 50)</text:p>
      <text:p text:style-name="P16"/>
      <text:p text:style-name="P16">def obtener_ip():</text:p>
      <text:p text:style-name="P16"><text:s text:c="4"/>try:</text:p>
      <text:p text:style-name="P16"><text:s text:c="8"/>return requests.get("https://api.ipify.org").text</text:p>
      <text:p text:style-name="P16"><text:s text:c="4"/>except:</text:p>
      <text:p text:style-name="P16"><text:s text:c="8"/>return socket.gethostbyname(socket.gethostname())</text:p>
      <text:p text:style-name="P16"/>
      <text:p text:style-name="P16">def menu_inicio():</text:p>
      <text:p text:style-name="P16"><text:s text:c="4"/>print(" <text:s text:c="129"/>")</text:p>
      <text:p text:style-name="P16"><text:s text:c="4"/>print(" <text:s text:c="129"/>")</text:p>
      <text:p text:style-name="P16"><text:s text:c="4"/>print(" <text:s text:c="36"/>------------Bienvenido al sistema IHKP----------- <text:s text:c="16"/>")</text:p>
      <text:p text:style-name="P16"><text:s text:c="4"/>print(" <text:s text:c="36"/>| <text:s text:c="74"/>| <text:s text:c="16"/>")</text:p>
      <text:p text:style-name="P16"><text:s text:c="4"/>print(" <text:s text:c="36"/>| <text:s text:c="74"/>| <text:s text:c="16"/>")</text:p>
      <text:p text:style-name="P16"><text:s text:c="4"/>print(" <text:s text:c="36"/>| <text:s text:c="74"/>| <text:s text:c="16"/>")</text:p>
      <text:p text:style-name="P16"><text:s text:c="4"/>print(" <text:s text:c="36"/>| <text:s text:c="74"/>| <text:s text:c="16"/>")</text:p>
      <text:p text:style-name="P16"><text:s text:c="4"/>print(" <text:s text:c="36"/>| <text:s/>1.Mostrar todos los logs <text:s text:c="33"/>| <text:s text:c="16"/>")</text:p>
      <text:p text:style-name="P16"><text:s text:c="4"/>print(" <text:s text:c="36"/>| <text:s/>2.Buscar por tipo <text:s text:c="15"/><text:tab/><text:tab/> <text:s text:c="8"/>| <text:s text:c="16"/>")</text:p>
      <text:p text:style-name="P16"><text:s text:c="4"/>print(" <text:s text:c="36"/>| <text:s/>3.Buscar por IP <text:s text:c="47"/>| <text:s text:c="16"/>")</text:p>
      <text:p text:style-name="P16"><text:s text:c="4"/>print(" <text:s text:c="36"/>| <text:s/>4.Detectar IPs sospechosas <text:s text:c="29"/>| <text:s text:c="16"/>")</text:p>
      <text:p text:style-name="P16"><text:s text:c="4"/>print(" <text:s text:c="36"/>| <text:s/>5.Salir <text:s text:c="61"/>| <text:s text:c="16"/>")</text:p>
      <text:p text:style-name="P16"><text:s text:c="4"/>print(" <text:s text:c="36"/>| <text:s text:c="74"/>| <text:s text:c="16"/>")</text:p>
      <text:p text:style-name="P16"><text:s text:c="4"/>print(" <text:s text:c="36"/>| <text:s text:c="74"/>| <text:s text:c="16"/>")</text:p>
      <text:p text:style-name="P16"><text:s text:c="4"/>print(" <text:s text:c="36"/>| <text:s text:c="74"/>| <text:s text:c="16"/>")</text:p>
      <text:p text:style-name="P16"><text:s text:c="4"/>print(" <text:s text:c="36"/>| <text:s text:c="74"/>| <text:s text:c="16"/>")</text:p>
      <text:p text:style-name="P16"><text:s text:c="4"/>print(" <text:s text:c="36"/>-----Desarrollado por Santiago Dellapiazza------ <text:s text:c="16"/>")</text:p>
      <text:p text:style-name="P16"><text:s text:c="4"/>print(" <text:s text:c="129"/>")</text:p>
      <text:p text:style-name="P16"><text:s text:c="4"/>print(" <text:s text:c="129"/>")</text:p>
      <text:p text:style-name="P16"/>
      <text:p text:style-name="P16"/>
      <text:p text:style-name="P16">def main():</text:p>
      <text:p text:style-name="P16"><text:s text:c="4"/>ip = obtener_ip()</text:p>
      <text:p text:style-name="P16"><text:s text:c="4"/>print(f"\n <text:s/>Sistema iniciado. IP Detectada: {ip}\n")</text:p>
      <text:p text:style-name="P16"><text:s text:c="4"/>analizador.registrar_log("INFO", ip, " <text:s/>Sistema iniciado <text:s text:c="3"/>")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s text:c="4"/>while True:</text:p>
      <text:p text:style-name="P16"><text:s text:c="8"/>try:</text:p>
      <text:p text:style-name="P16"><text:s text:c="12"/>menu_inicio()</text:p>
      <text:p text:style-name="P16"><text:s text:c="12"/>opcion = int(input("\n--------&gt; Seleccione una opción (1-5): "))</text:p>
      <text:p text:style-name="P16"><text:s text:c="12"/>match opcion:</text:p>
      <text:p text:style-name="P16"><text:s text:c="16"/>case 1:</text:p>
      <text:p text:style-name="P16"><text:s text:c="20"/>limpiar_consola()</text:p>
      <text:p text:style-name="P16"><text:s text:c="20"/>print(" <text:s text:c="42"/><text:tab/><text:tab/><text:tab/> <text:s text:c="2"/>")</text:p>
      <text:p text:style-name="P16"><text:s text:c="20"/>print("======= 1) Mostrar todos los logs ========\n")</text:p>
      <text:p text:style-name="P16"><text:s text:c="20"/>print(" <text:s text:c="42"/><text:tab/><text:tab/><text:tab/> <text:s text:c="2"/>")</text:p>
      <text:p text:style-name="P16"><text:s text:c="20"/>logs = analizador.leer_logs()</text:p>
      <text:p text:style-name="P16"><text:s text:c="20"/>analizador.mostrar_logs(logs)</text:p>
      <text:p text:style-name="P16"><text:s text:c="20"/>analizador.registrar_log("INFO", ip, "-------&gt; 1) Mostrar todos los logs")</text:p>
      <text:p text:style-name="P16"/>
      <text:p text:style-name="P16"><text:s text:c="16"/>case 2:</text:p>
      <text:p text:style-name="P16"><text:s text:c="20"/>limpiar_consola()</text:p>
      <text:p text:style-name="P16"><text:s text:c="20"/>print(" <text:s text:c="32"/><text:tab/><text:tab/><text:tab/> <text:s text:c="3"/>")</text:p>
      <text:p text:style-name="P16"><text:s text:c="20"/>print("======= 2) Buscar por tipo ========\n")</text:p>
      <text:p text:style-name="P16"><text:s text:c="20"/>print(" <text:s text:c="30"/><text:tab/><text:tab/> <text:s text:c="15"/>")</text:p>
      <text:p text:style-name="P16"><text:s text:c="20"/>tipo = input("---------&gt; Ingrese el tipo (INFO / WARNING / ERROR): ").strip().upper()</text:p>
      <text:p text:style-name="P16"><text:s text:c="20"/>logs = analizador.leer_logs()</text:p>
      <text:p text:style-name="P16"><text:s text:c="20"/>resultado = analizador.buscar_por_tipo(logs, tipo)</text:p>
      <text:p text:style-name="P16"><text:s text:c="20"/>analizador.registrar_log("INFO", ip, f"----------&gt; 2) Buscar por tipo {tipo}")</text:p>
      <text:p text:style-name="P16"><text:s text:c="20"/>if not resultado:</text:p>
      <text:p text:style-name="P16"><text:s text:c="24"/>print(f"\n---------&gt; No se encontraron logs de tipo {tipo}.")</text:p>
      <text:p text:style-name="P16"><text:s text:c="20"/>else:</text:p>
      <text:p text:style-name="P16"><text:s text:c="24"/>print(f"\n---------&gt; Logs de tipo {tipo}: {len(resultado)} encontrados")</text:p>
      <text:p text:style-name="P16"><text:s text:c="24"/>analizador.mostrar_logs(resultado)</text:p>
      <text:p text:style-name="P16"/>
      <text:p text:style-name="P16"><text:s text:c="16"/>case 3:</text:p>
      <text:p text:style-name="P16"><text:s text:c="20"/>limpiar_consola()</text:p>
      <text:p text:style-name="P16"><text:s text:c="20"/>print(" <text:s text:c="34"/><text:tab/><text:tab/><text:tab/>")</text:p>
      <text:p text:style-name="P16"><text:s text:c="20"/>print("======= 3) Buscar por IP ========\n")</text:p>
      <text:p text:style-name="P16"><text:s text:c="20"/>print(" <text:s text:c="34"/><text:tab/><text:tab/><text:tab/>")</text:p>
      <text:p text:style-name="P16"><text:s text:c="20"/>ip_buscar = input("--------&gt;Ingrese la IP a buscar: ").strip()</text:p>
      <text:p text:style-name="P16"><text:s text:c="20"/>logs = analizador.leer_logs()</text:p>
      <text:p text:style-name="P16"><text:s text:c="20"/>resultado = analizador.buscar_por_ip(logs, ip_buscar)</text:p>
      <text:p text:style-name="P16"><text:s text:c="20"/>analizador.registrar_log("INFO", ip, f" -------&gt; 3) Buscar por IP {ip_buscar}")</text:p>
      <text:p text:style-name="P16"><text:s text:c="20"/>if not resultado:</text:p>
      <text:p text:style-name="P16"><text:s text:c="24"/>print(f"\n-------&gt; No se encontraron logs para la IP {ip_buscar}.")</text:p>
      <text:p text:style-name="P16"><text:s text:c="20"/>else:</text:p>
      <text:p text:style-name="P16"><text:s text:c="24"/>print(f"\n--------&gt;Logs de IP {ip_buscar}: {len(resultado)} encontrados")</text:p>
      <text:p text:style-name="P16"><text:s text:c="24"/>analizador.mostrar_logs(resultado)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 text:c="16"/>case 4:</text:p>
      <text:p text:style-name="P16"><text:s text:c="20"/>limpiar_consola()</text:p>
      <text:p text:style-name="P16"><text:s text:c="20"/>print(" <text:s text:c="45"/><text:tab/><text:tab/><text:tab/> <text:s text:c="9"/>")</text:p>
      <text:p text:style-name="P16"><text:s text:c="20"/>print("======== 4) Detectar IPs sospechosas ========\n")</text:p>
      <text:p text:style-name="P16"><text:s text:c="20"/>print(" <text:s text:c="46"/><text:tab/><text:tab/><text:tab/> <text:s text:c="9"/>")</text:p>
      <text:p text:style-name="P16"><text:s text:c="20"/>logs = analizador.leer_logs()</text:p>
      <text:p text:style-name="P16"><text:s text:c="20"/>sospechosas = analizador.detectar_ips_sospechosas(logs)</text:p>
      <text:p text:style-name="P16"><text:s text:c="20"/>analizador.registrar_log("INFO", ip, "--------&gt; 4) Detectar IPs sospechosas")</text:p>
      <text:p text:style-name="P16"><text:s text:c="20"/>if not sospechosas:</text:p>
      <text:p text:style-name="P16"><text:s text:c="24"/>print("\n---------&gt; No se detectaron IPs sospechosas.")</text:p>
      <text:p text:style-name="P16"><text:s text:c="20"/>else:</text:p>
      <text:p text:style-name="P16"><text:s text:c="24"/>print(f"\n{'IP':&lt;20} {'&lt;--------EVENTOS SOSPECHOSOS'}")</text:p>
      <text:p text:style-name="P16"><text:s text:c="24"/>print("-" * 40)</text:p>
      <text:p text:style-name="P16"><text:s text:c="24"/>for ip_s, cantidad in sospechosas.items():</text:p>
      <text:p text:style-name="P16"><text:s text:c="28"/>print(f"{ip_s:&lt;20} {cantidad}")</text:p>
      <text:p text:style-name="P16"/>
      <text:p text:style-name="P16"><text:s text:c="16"/>case 5:</text:p>
      <text:p text:style-name="P16"><text:s text:c="20"/>limpiar_consola()</text:p>
      <text:p text:style-name="P16"><text:s text:c="20"/>print("======= 5) Salir del sistema ========\n")</text:p>
      <text:p text:style-name="P16"><text:s text:c="20"/>analizador.registrar_log("INFO", ip, " <text:s/>5)Salir")</text:p>
      <text:p text:style-name="P16"><text:s text:c="20"/>analizador.registrar_log("INFO", ip, " <text:s/>Sistema cerrado ")</text:p>
      <text:p text:style-name="P16"><text:s text:c="20"/>print("\n ---------&gt; Cerrando el sistema. Hasta luego.")</text:p>
      <text:p text:style-name="P16"><text:s text:c="20"/>break</text:p>
      <text:p text:style-name="P16"/>
      <text:p text:style-name="P16"><text:s text:c="16"/>case _:</text:p>
      <text:p text:style-name="P16"><text:s text:c="20"/>limpiar_consola()</text:p>
      <text:p text:style-name="P16"><text:s text:c="20"/>print("========= Opción inválida ==========\n")</text:p>
      <text:p text:style-name="P16"><text:s text:c="20"/>print(" ------&gt; Opción inválida. Ingrese un número entre 1 y 5.")</text:p>
      <text:p text:style-name="P16"><text:s text:c="20"/>analizador.registrar_log("WARNING", ip, "Opción inválida seleccionada")</text:p>
      <text:p text:style-name="P16"/>
      <text:p text:style-name="P16"><text:s text:c="8"/>except ValueError:</text:p>
      <text:p text:style-name="P16"><text:s text:c="12"/>limpiar_consola()</text:p>
      <text:p text:style-name="P16"><text:s text:c="12"/>print("========== Error de entrada =========\n")</text:p>
      <text:p text:style-name="P16"><text:s text:c="12"/>print("------&gt; Error: debe ingresar un número.")</text:p>
      <text:p text:style-name="P16"><text:s text:c="12"/>analizador.registrar_log("ERROR", ip, "Entrada inválida (no numérica)")</text:p>
      <text:p text:style-name="P16"/>
      <text:p text:style-name="P16"><text:s text:c="8"/>except KeyboardInterrupt:</text:p>
      <text:p text:style-name="P16"><text:s text:c="12"/>limpiar_consola()</text:p>
      <text:p text:style-name="P16"><text:s text:c="12"/>print("==========: Interrupción del usuario ==========\n")</text:p>
      <text:p text:style-name="P16"><text:s text:c="12"/>analizador.registrar_log("WARNING", ip, "Programa interrumpido por el usuario")</text:p>
      <text:p text:style-name="P16"><text:s text:c="12"/>print("\n--------&gt; Programa interrumpido por el usuario.")</text:p>
      <text:p text:style-name="P16"><text:s text:c="12"/>break</text:p>
      <text:p text:style-name="P16"/>
      <text:p text:style-name="P16"><text:s text:c="8"/>except Exception as e:</text:p>
      <text:p text:style-name="P16"><text:s text:c="12"/>limpiar_consola()</text:p>
      <text:p text:style-name="P16"><text:s text:c="12"/>print("=========== Error inesperado ==========\n")</text:p>
      <text:p text:style-name="P16"><text:s text:c="12"/>analizador.registrar_log("ERROR", ip, f"Error inesperado: {e}")</text:p>
      <text:p text:style-name="P16"><text:s text:c="12"/>print(f"--------&gt; Error inesperado: {e}")</text:p>
      <text:p text:style-name="P16"/>
      <text:p text:style-name="P31">main()</text:p>
      <text:h text:style-name="P26" text:outline-level="1" text:is-list-header="true"><text:bookmark-start text:name="__RefHeading___Toc35782_3656226483"/><text:soft-page-break/><text:span text:style-name="T7">a</text:span>nalizador.py<text:bookmark-end text:name="__RefHeading___Toc35782_3656226483"/></text:h>
      <text:p text:style-name="P33"/>
      <text:p text:style-name="P17"/>
      <text:p text:style-name="P17">import os</text:p>
      <text:p text:style-name="P17">import datetime</text:p>
      <text:p text:style-name="P17"/>
      <text:p text:style-name="P17">ARCHIVO_LOGS = os.path.join(os.path.dirname(__file__), "logs.txt")</text:p>
      <text:p text:style-name="P17"/>
      <text:p text:style-name="P17">def registrar_log(tipo, ip, descripcion):</text:p>
      <text:p text:style-name="P17"><text:s text:c="4"/>fecha = datetime.datetime.now().strftime("%Y-%m-%d")</text:p>
      <text:p text:style-name="P17"><text:s text:c="4"/>hora = datetime.datetime.now().strftime("%H:%M:%S")</text:p>
      <text:p text:style-name="P17"><text:s text:c="4"/>linea = f"{fecha},{hora},{tipo},{ip},{descripcion}\n"</text:p>
      <text:p text:style-name="P17"><text:s text:c="4"/>with open(ARCHIVO_LOGS, "a") as archivo:</text:p>
      <text:p text:style-name="P17"><text:s text:c="8"/>archivo.write(linea)</text:p>
      <text:p text:style-name="P17"><text:s text:c="8"/>archivo.flush() <text:s/># asegura escritura inmediata</text:p>
      <text:p text:style-name="P17"/>
      <text:p text:style-name="P17">def leer_logs():</text:p>
      <text:p text:style-name="P17"><text:s text:c="4"/>logs = []</text:p>
      <text:p text:style-name="P17"><text:s text:c="4"/>if not os.path.exists(ARCHIVO_LOGS):</text:p>
      <text:p text:style-name="P17"><text:s text:c="8"/>return logs</text:p>
      <text:p text:style-name="P17"><text:s text:c="4"/>with open(ARCHIVO_LOGS, "r") as archivo:</text:p>
      <text:p text:style-name="P17"><text:s text:c="8"/>for linea in archivo:</text:p>
      <text:p text:style-name="P17"><text:s text:c="12"/>partes = linea.strip().split(",")</text:p>
      <text:p text:style-name="P17"><text:s text:c="12"/>if len(partes) == 5:</text:p>
      <text:p text:style-name="P17"><text:s text:c="16"/>log = {</text:p>
      <text:p text:style-name="P17"><text:s text:c="20"/>"fecha": partes[0],</text:p>
      <text:p text:style-name="P17"><text:s text:c="20"/>"hora": partes[1],</text:p>
      <text:p text:style-name="P17"><text:s text:c="20"/>"tipo": partes[2],</text:p>
      <text:p text:style-name="P17"><text:s text:c="20"/>"ip": partes[3],</text:p>
      <text:p text:style-name="P17"><text:s text:c="20"/>"descripcion": partes[4]</text:p>
      <text:p text:style-name="P17"><text:s text:c="16"/>}</text:p>
      <text:p text:style-name="P17"><text:s text:c="16"/>logs.append(log)</text:p>
      <text:p text:style-name="P17"><text:s text:c="4"/>return logs</text:p>
      <text:p text:style-name="P17"/>
      <text:p text:style-name="P17">def mostrar_logs(logs):</text:p>
      <text:p text:style-name="P17"><text:s text:c="4"/>if not logs:</text:p>
      <text:p text:style-name="P17"><text:s text:c="8"/>print("No hay logs para mostrar.")</text:p>
      <text:p text:style-name="P17"><text:s text:c="8"/>return</text:p>
      <text:p text:style-name="P17"><text:s text:c="4"/>print(f"\n{'FECHA':&lt;12} {'HORA':&lt;10} {'TIPO':&lt;8} {'IP':&lt;15} {'DESCRIPCIÓN'}")</text:p>
      <text:p text:style-name="P17"><text:s text:c="4"/>print("-" * 60)</text:p>
      <text:p text:style-name="P17"><text:s text:c="4"/>for log in logs:</text:p>
      <text:p text:style-name="P17"><text:s text:c="8"/>print(f"{log['fecha']:&lt;12} {log['hora']:&lt;10} {log['tipo']:&lt;8} {log['ip']:&lt;15} {log['descripcion']}")</text:p>
      <text:p text:style-name="P17"/>
      <text:p text:style-name="P17">def buscar_por_tipo(logs, tipo):</text:p>
      <text:p text:style-name="P17"><text:s text:c="4"/>return [log for log in logs if log["tipo"] == tipo]</text:p>
      <text:p text:style-name="P17"/>
      <text:p text:style-name="P17">def buscar_por_ip(logs, ip):</text:p>
      <text:p text:style-name="P17"><text:s text:c="4"/>return [log for log in logs if log["ip"] == ip]</text:p>
      <text:p text:style-name="P17"><text:soft-page-break/></text:p>
      <text:p text:style-name="P17">def detectar_ips_sospechosas(logs, umbral=2):</text:p>
      <text:p text:style-name="P17"><text:s text:c="4"/>conteo = {}</text:p>
      <text:p text:style-name="P17"><text:s text:c="4"/>for log in logs:</text:p>
      <text:p text:style-name="P17"><text:s text:c="8"/>if log["tipo"] == "ERROR":</text:p>
      <text:p text:style-name="P17"><text:s text:c="12"/>conteo[log["ip"]] = conteo.get(log["ip"], 0) + 1</text:p>
      <text:p text:style-name="P17"><text:s text:c="4"/>return {ip: cant for ip, cant in conteo.items() if cant &gt;= umbral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/>
      <text:h text:style-name="Heading_20_1" text:outline-level="1"><text:bookmark-start text:name="__RefHeading___Toc35784_3656226483"/><text:soft-page-break/><text:span text:style-name="T9">logs.txt</text:span><text:bookmark-end text:name="__RefHeading___Toc35784_3656226483"/></text:h>
      <text:p text:style-name="Text_20_body"/>
      <text:p text:style-name="Text_20_body"/>
      <text:p text:style-name="Text_20_body"/>
      <text:p text:style-name="Text_20_body">2026-06-20,23:20:01,INFO,127.0.0.1,Usuario inició sesión correctamente</text:p>
      <text:p text:style-name="Text_20_body">2026-06-20,23:20:02,WARNING,192.168.1.10,Intento de acceso fallido</text:p>
      <text:p text:style-name="Text_20_body">2026-06-20,23:20:03,ERROR,192.168.1.20,Acceso denegado por contraseña incorrecta</text:p>
      <text:p text:style-name="Text_20_body">2026-06-20,23:20:04,INFO,8.8.8.8,Conexión externa detectada</text:p>
      <text:p text:style-name="Text_20_body">2026-06-20,23:20:05,WARNING,10.0.0.5,Múltiples intentos de login</text:p>
      <text:p text:style-name="Text_20_body">2026-06-20,23:20:06,ERROR,172.16.0.3,Bloqueo de cuenta por intentos fallidos</text:p>
      <text:p text:style-name="Text_20_body">2026-06-21,14:14:59,INFO,179.26.130.29,Sistema iniciado</text:p>
      <text:p text:style-name="Text_20_body">2026-06-21,14:15:46,WARNING,179.26.130.29,Programa interrumpido por el usuario</text:p>
      <text:p text:style-name="Text_20_body">2026-06-21,14:15:46,INFO,179.26.130.29,Sistema iniciado</text:p>
      <text:p text:style-name="Text_20_body">2026-06-21,14:15:51,WARNING,179.26.130.29,Programa interrumpido por el usuario</text:p>
      <text:p text:style-name="Text_20_body">2026-06-21,14:15:51,INFO,179.26.130.29,Sistema iniciado</text:p>
      <text:p text:style-name="Text_20_body">2026-06-21,14:16:10,WARNING,179.26.130.29,Programa interrumpido por el usuario</text:p>
      <text:p text:style-name="Text_20_body">2026-06-21,14:16:11,INFO,179.26.130.29,Sistema iniciado</text:p>
      <text:p text:style-name="Text_20_body">2026-06-21,14:16:17,WARNING,179.26.130.29,Programa interrumpido por el usuario</text:p>
      <text:p text:style-name="Text_20_body">2026-06-21,14:16:18,INFO,179.26.130.29,Sistema iniciado</text:p>
      <text:p text:style-name="Text_20_body">2026-06-21,14:16:30,WARNING,179.26.130.29,Programa interrumpido por el usuario</text:p>
      <text:p text:style-name="Text_20_body">2026-06-21,14:16:30,INFO,179.26.130.29,Sistema iniciado</text:p>
      <text:p text:style-name="Text_20_body">2026-06-21,14:16:36,WARNING,179.26.130.29,Programa interrumpido por el usuario</text:p>
      <text:p text:style-name="Text_20_body">2026-06-21,14:16:36,INFO,179.26.130.29,Sistema iniciado</text:p>
      <text:p text:style-name="Text_20_body">2026-06-21,14:29:32,WARNING,179.26.130.29,Programa interrumpido por el usuario</text:p>
      <text:p text:style-name="Text_20_body">2026-06-21,14:29:33,INFO,179.26.130.29,Sistema iniciado</text:p>
      <text:p text:style-name="Text_20_body">2026-06-21,14:29:41,INFO,179.26.130.29,1) Mostrar todos los logs</text:p>
      <text:p text:style-name="Text_20_body">2026-06-21,14:30:01,INFO,179.26.130.29,1) Mostrar todos los logs</text:p>
      <text:p text:style-name="Text_20_body">2026-06-21,14:30:04,INFO,179.26.130.29,Opción 5 - Salir</text:p>
      <text:p text:style-name="Text_20_body">2026-06-21,14:30:04,INFO,179.26.130.29,Sistema cerrado</text:p>
      <text:p text:style-name="Text_20_body">2026-06-21,14:40:50,INFO,179.26.130.29, <text:s/>Sistema iniciado <text:s text:c="3"/></text:p>
      <text:p text:style-name="Text_20_body"><text:soft-page-break/>2026-06-21,14:40:52,WARNING,179.26.130.29,Programa interrumpido por el usuario</text:p>
      <text:p text:style-name="Text_20_body">2026-06-21,14:40:53,INFO,179.26.130.29, <text:s/>Sistema iniciado <text:s text:c="3"/></text:p>
      <text:p text:style-name="Text_20_body">2026-06-21,14:40:55,INFO,179.26.130.29,-------&gt; 1) Mostrar todos los logs</text:p>
      <text:p text:style-name="Text_20_body">2026-06-21,14:41:08,INFO,179.26.130.29,----------&gt; 2) Buscar por tipo INFO</text:p>
      <text:p text:style-name="Text_20_body">2026-06-21,14:41:23,INFO,179.26.130.29,----------&gt; 2) Buscar por tipo WARNING</text:p>
      <text:p text:style-name="Text_20_body">2026-06-21,14:41:33,INFO,179.26.130.29,----------&gt; 2) Buscar por tipo ERROR</text:p>
      <text:p text:style-name="Text_20_body">2026-06-21,14:41:54,INFO,179.26.130.29, -------&gt; 3) Buscar por IP 192.172.1.10</text:p>
      <text:p text:style-name="Text_20_body">2026-06-21,14:42:10,INFO,179.26.130.29, -------&gt; 3) Buscar por IP 192.168.1.20</text:p>
      <text:p text:style-name="Text_20_body">2026-06-21,14:42:18,INFO,179.26.130.29,--------&gt; 4) Detectar IPs sospechosas</text:p>
      <text:p text:style-name="Text_20_body">2026-06-21,14:42:24,INFO,179.26.130.29,--------&gt; 4) Detectar IPs sospechosas</text:p>
      <text:p text:style-name="Text_20_body">2026-06-21,14:42:26,INFO,179.26.130.29,--------&gt; 5)Salir</text:p>
      <text:p text:style-name="Text_20_body">2026-06-21,14:42:26,INFO,179.26.130.29, <text:s/>Sistema cerrado </text:p>
      <text:p text:style-name="Text_20_body">2026-06-21,15:10:23,INFO,179.26.130.29, <text:s/>Sistema iniciado <text:s text:c="3"/></text:p>
      <text:p text:style-name="Text_20_body">2026-06-21,15:10:25,WARNING,179.26.130.29,Programa interrumpido por el usuario</text:p>
      <text:p text:style-name="Text_20_body">2026-06-21,15:10:26,INFO,179.26.130.29, <text:s/>Sistema iniciado <text:s text:c="3"/></text:p>
      <text:p text:style-name="Text_20_body">2026-06-21,15:10:29,INFO,179.26.130.29,-------&gt; 1) Mostrar todos los logs</text:p>
      <text:p text:style-name="Text_20_body">2026-06-21,15:10:35,INFO,179.26.130.29,----------&gt; 2) Buscar por tipo INFO</text:p>
      <text:p text:style-name="Text_20_body">2026-06-21,15:10:39,ERROR,179.26.130.29,Entrada inválida (no numérica)</text:p>
      <text:p text:style-name="Text_20_body">2026-06-21,15:10:50,INFO,179.26.130.29,----------&gt; 2) Buscar por tipo WARNING</text:p>
      <text:p text:style-name="Text_20_body">2026-06-21,15:10:58,INFO,179.26.130.29,----------&gt; 2) Buscar por tipo ERROR</text:p>
      <text:p text:style-name="Text_20_body">2026-06-21,15:14:11,INFO,179.26.130.29, -------&gt; 3) Buscar por IP 192.168.1.20</text:p>
      <text:p text:style-name="Text_20_body">2026-06-21,15:14:18,INFO,179.26.130.29,--------&gt; 4) Detectar IPs sospechosas</text:p>
      <text:p text:style-name="Text_20_body">2026-06-21,15:14:22,INFO,179.26.130.29, <text:s/>5)Salir</text:p>
      <text:p text:style-name="Text_20_body">2026-06-21,15:14:22,INFO,179.26.130.29, <text:s/>Sistema cerrado </text:p>
      <text:p text:style-name="Text_20_body">2026-06-21,16:01:55,INFO,179.26.130.29, <text:s/>Sistema iniciado <text:s text:c="3"/></text:p>
      <text:p text:style-name="Text_20_body">2026-06-21,16:02:02,WARNING,179.26.130.29,Programa interrumpido por el usuario</text:p>
      <text:p text:style-name="Text_20_body">2026-06-21,16:02:03,INFO,179.26.130.29, <text:s/>Sistema iniciado <text:s text:c="3"/></text:p>
      <text:p text:style-name="Text_20_body">2026-06-21,16:02:05,INFO,179.26.130.29,-------&gt; 1) Mostrar todos los logs</text:p>
      <text:p text:style-name="Text_20_body">2026-06-21,16:02:11,INFO,179.26.130.29,----------&gt; 2) Buscar por tipo INFO</text:p>
      <text:p text:style-name="Text_20_body">2026-06-21,16:05:36,INFO,179.26.130.29, <text:s/>Sistema iniciado <text:s text:c="3"/></text:p>
      <text:p text:style-name="Text_20_body">2026-06-21,16:05:43,INFO,179.26.130.29,----------&gt; 2) Buscar por tipo INFO</text:p>
      <text:p text:style-name="Text_20_body"><text:soft-page-break/>2026-06-21,16:05:48,INFO,179.26.130.29,----------&gt; 2) Buscar por tipo WARNING</text:p>
      <text:p text:style-name="Text_20_body">2026-06-21,16:05:51,INFO,179.26.130.29,----------&gt; 2) Buscar por tipo ERROR</text:p>
      <text:p text:style-name="Text_20_body">2026-06-21,16:05:59,INFO,179.26.130.29, -------&gt; 3) Buscar por IP 192.168.1.20</text:p>
      <text:p text:style-name="Text_20_body">2026-06-21,16:06:04,INFO,179.26.130.29,--------&gt; 4) Detectar IPs sospechosas</text:p>
      <text:p text:style-name="Text_20_body">2026-06-21,16:06:06,INFO,179.26.130.29, <text:s/>5)Salir</text:p>
      <text:p text:style-name="Text_20_body">2026-06-21,16:06:06,INFO,179.26.130.29, <text:s/>Sistema cerrado </text:p>
      <text:p text:style-name="Text_20_body">2026-06-21,18:12:12,INFO,179.26.130.29, <text:s/>Sistema iniciado <text:s text:c="3"/></text:p>
      <text:p text:style-name="Text_20_body">2026-06-21,18:12:15,WARNING,179.26.130.29,Programa interrumpido por el usuario</text:p>
      <text:p text:style-name="Text_20_body">2026-06-21,18:12:16,INFO,179.26.130.29, <text:s/>Sistema iniciado <text:s text:c="3"/></text:p>
      <text:p text:style-name="Text_20_body">2026-06-21,18:12:21,INFO,179.26.130.29,-------&gt; 1) Mostrar todos los logs</text:p>
      <text:p text:style-name="Text_20_body">2026-06-21,18:12:41,INFO,179.26.130.29,----------&gt; 2) Buscar por tipo ERROR</text:p>
      <text:p text:style-name="Text_20_body">2026-06-21,18:12:52,INFO,179.26.130.29, <text:s/>5)Salir</text:p>
      <text:p text:style-name="Text_20_body">2026-06-21,18:12:52,INFO,179.26.130.29, <text:s/>Sistema cerrado </text:p>
      <text:p text:style-name="Text_20_body">2026-06-22,22:53:17,INFO,179.25.78.193, <text:s/>Sistema iniciado <text:s text:c="3"/></text:p>
      <text:p text:style-name="Text_20_body">2026-06-22,22:53:20,INFO,179.25.78.193,-------&gt; 1) Mostrar todos los logs</text:p>
      <text:p text:style-name="Text_20_body">2026-06-22,22:53:29,INFO,179.25.78.193,----------&gt; 2) Buscar por tipo INFO</text:p>
      <text:p text:style-name="Text_20_body">2026-06-22,22:53:34,INFO,179.25.78.193,----------&gt; 2) Buscar por tipo ERROR</text:p>
      <text:p text:style-name="Text_20_body">2026-06-22,22:53:38,INFO,179.25.78.193,----------&gt; 2) Buscar por tipo WARNING</text:p>
      <text:p text:style-name="Text_20_body">2026-06-22,22:53:46,INFO,179.25.78.193, -------&gt; 3) Buscar por IP 192.168.1.20</text:p>
      <text:p text:style-name="Text_20_body">2026-06-22,22:53:49,INFO,179.25.78.193,--------&gt; 4) Detectar IPs sospechosas</text:p>
      <text:p text:style-name="Text_20_body">2026-06-22,22:53:52,INFO,179.25.78.193, <text:s/>5)Salir</text:p>
      <text:p text:style-name="Text_20_body">2026-06-22,22:53:52,INFO,179.25.78.193, <text:s/>Sistema cerrado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9" text:outline-level="1" text:is-list-header="true"><text:bookmark-start text:name="__RefHeading___Toc35791_3656226483"/><text:soft-page-break/><text:span text:style-name="T10">Hoja testigo</text:span><text:bookmark-end text:name="__RefHeading___Toc35791_365622648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2d860" officeooo:paragraph-rsid="0022d860"/>
    </style:style>
    <style:style style:name="MT1" style:family="text">
      <style:text-properties officeooo:rsid="00329dd4"/>
    </style:style>
    <style:style style:name="MT2" style:family="text">
      <style:text-properties officeooo:rsid="003418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 draw:fill-image-width="0cm" draw:fill-image-height="0cm" style:repeat="repeat" draw:fill-image-ref-point-x="0%" draw:fill-image-ref-point-y="0%" draw:fill-image-ref-point="center" draw:tile-repeat-offset="0% vertical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antiago Dellapiazza<text:tab/>SHIKP<text:tab/>Pagina <text:page-number text:select-page="current">2</text:page-number><text:s/>de <text:span text:style-name="MT1">1</text:span><text:span text:style-name="MT2">5</text:span> 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2T21:14:40.141783892</meta:creation-date>
    <dc:date>2026-06-22T23:03:22.201344913</dc:date>
    <meta:editing-duration>PT15H43M19S</meta:editing-duration>
    <meta:editing-cycles>17</meta:editing-cycles>
    <meta:generator>LibreOffice/7.4.7.2$Linux_X86_64 LibreOffice_project/40$Build-2</meta:generator>
    <dc:title>Manual_Usuario_SIHKP</dc:title>
    <meta:document-statistic meta:table-count="1" meta:image-count="3" meta:object-count="0" meta:page-count="15" meta:paragraph-count="331" meta:word-count="1576" meta:character-count="18534" meta:non-whitespace-character-count="12788"/>
    <meta:user-defined meta:name="Santiago Dellapiazza" meta:value-type="date">2026-06-12T15:00:00</meta:user-defined>
  </office:meta>
</office:document-meta>
</file>